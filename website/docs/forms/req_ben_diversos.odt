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Times New Roman3" svg:font-family="'Times New Roman'" style:font-adornments="Itálico" style:font-family-generic="roman"/>
    <style:font-face style:name="Times New Roman2" svg:font-family="'Times New Roman'" style:font-adornments="Normal" style:font-family-generic="roman"/>
    <style:font-face style:name="Times New Roman1" svg:font-family="'Times New Roman', 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Light" svg:font-family="ErieLight" style:font-family-generic="swiss" style:font-pitch="variable"/>
    <style:font-face style:name="Trebuchet MS" svg:font-family="'Trebuchet MS'" style:font-family-generic="swiss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Documento" style:family="table">
      <style:table-properties style:width="16.962cm" fo:margin-left="0.011cm" fo:margin-right="0.028cm" table:align="margins" style:writing-mode="lr-tb"/>
    </style:style>
    <style:style style:name="TabelaDocumento.A" style:family="table-column">
      <style:table-column-properties style:column-width="2.958cm" style:rel-column-width="11429*"/>
    </style:style>
    <style:style style:name="TabelaDocumento.B" style:family="table-column">
      <style:table-column-properties style:column-width="0.877cm" style:rel-column-width="3386*"/>
    </style:style>
    <style:style style:name="TabelaDocumento.C" style:family="table-column">
      <style:table-column-properties style:column-width="2.268cm" style:rel-column-width="8764*"/>
    </style:style>
    <style:style style:name="TabelaDocumento.D" style:family="table-column">
      <style:table-column-properties style:column-width="1.376cm" style:rel-column-width="5315*"/>
    </style:style>
    <style:style style:name="TabelaDocumento.E" style:family="table-column">
      <style:table-column-properties style:column-width="2.014cm" style:rel-column-width="7782*"/>
    </style:style>
    <style:style style:name="TabelaDocumento.F" style:family="table-column">
      <style:table-column-properties style:column-width="2.113cm" style:rel-column-width="8164*"/>
    </style:style>
    <style:style style:name="TabelaDocumento.G" style:family="table-column">
      <style:table-column-properties style:column-width="2.09cm" style:rel-column-width="8076*"/>
    </style:style>
    <style:style style:name="TabelaDocumento.H" style:family="table-column">
      <style:table-column-properties style:column-width="3.267cm" style:rel-column-width="12619*"/>
    </style:style>
    <style:style style:name="TabelaDocumento.1" style:family="table-row">
      <style:table-row-properties style:row-height="0.7cm" fo:keep-together="auto"/>
    </style:style>
    <style:style style:name="TabelaDocumento.A1" style:family="table-cell">
      <style:table-cell-properties style:vertical-align="middle" fo:padding-left="0.191cm" fo:padding-right="0.191cm" fo:padding-top="0cm" fo:padding-bottom="0cm" fo:border="1pt solid #000000"/>
    </style:style>
    <style:style style:name="TabelaDocumento.A2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Documento.A4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TabelaDocumento.A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/>
    </style:style>
    <style:style style:name="TabelaDocumento.10" style:family="table-row">
      <style:table-row-properties style:min-row-height="5.662cm" fo:keep-together="auto"/>
    </style:style>
    <style:style style:name="TabelaDocumento.A10" style:family="table-cell">
      <style:table-cell-properties fo:padding="0.191cm" fo:border="1pt solid #000000"/>
    </style:style>
    <style:style style:name="TabelaDocumento.11" style:family="table-row">
      <style:table-row-properties style:min-row-height="3.276cm" fo:keep-together="auto"/>
    </style:style>
    <style:style style:name="TabelaDocumento.A11" style:family="table-cell">
      <style:table-cell-properties fo:padding="0.191cm" fo:border-left="1pt solid #000000" fo:border-right="1pt solid #000000" fo:border-top="none" fo:border-bottom="1pt solid #000000"/>
    </style:style>
    <style:style style:name="TabelaDocumento.A13" style:family="table-cell">
      <style:table-cell-properties style:vertical-align="middle"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Tabela1" style:family="table">
      <style:table-properties style:width="16.581cm" table:align="margins"/>
    </style:style>
    <style:style style:name="Tabela1.A" style:family="table-column">
      <style:table-column-properties style:column-width="16.581cm" style:rel-column-width="65535*"/>
    </style:style>
    <style:style style:name="Tabela1.A1" style:family="table-cell">
      <style:table-cell-properties fo:background-color="transparent" fo:padding="0.097cm" fo:border-left="none" fo:border-right="none" fo:border-top="0.05pt solid #cccccc" fo:border-bottom="0.05pt solid #cccccc">
        <style:background-image/>
      </style:table-cell-properties>
    </style:style>
    <style:style style:name="Tabela1.A2" style:family="table-cell">
      <style:table-cell-properties fo:background-color="transparent" fo:padding="0.097cm" fo:border-left="none" fo:border-right="none" fo:border-top="none" fo:border-bottom="0.05pt solid #cccccc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0bbef3" style:font-size-asian="6pt" style:font-weight-asian="bold" style:font-size-complex="6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bbef3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0bbef3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bbef3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font-name="Trebuchet MS" fo:font-size="13pt" style:font-size-asian="13pt" style:font-size-complex="13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font-name="Trebuchet MS"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officeooo:paragraph-rsid="00077b92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officeooo:paragraph-rsid="000ade0d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style:font-name="Times New Roman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Times New Roman" fo:font-size="14pt" officeooo:paragraph-rsid="00077b92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.101cm" loext:contextual-spacing="false" fo:text-align="start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ErieLight" fo:font-size="7.5pt" fo:font-weight="bold" style:font-size-asian="7.5pt" style:font-weight-asian="bold" style:font-size-complex="7.5pt" style:font-weight-complex="bold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0.36cm" fo:margin-right="0cm" fo:margin-top="0cm" fo:margin-bottom="0cm" loext:contextual-spacing="false" fo:line-height="100%" fo:text-align="start" style:justify-single-word="false" fo:text-indent="0cm" style:auto-text-indent="false" style:text-autospace="none">
        <style:tab-stops/>
      </style:paragraph-properties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0.36cm" fo:margin-right="0cm" fo:margin-top="0cm" fo:margin-bottom="0cm" loext:contextual-spacing="false" fo:line-height="100%" fo:text-align="start" style:justify-single-word="false" fo:text-indent="0cm" style:auto-text-indent="false" style:text-autospace="none">
        <style:tab-stops/>
      </style:paragraph-properties>
      <style:text-properties style:font-name="Times New Roman" fo:font-size="14pt" officeooo:paragraph-rsid="00077b92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>
      <style:paragraph-properties fo:text-align="start"/>
      <style:text-properties style:font-name="Times New Roman2" fo:font-size="12pt"/>
    </style:style>
    <style:style style:name="P23" style:family="paragraph">
      <style:paragraph-properties fo:text-align="start"/>
      <style:text-properties style:text-line-through-style="none" style:text-line-through-type="none" style:font-name="Times New Roman3" fo:font-size="12pt" fo:font-style="italic" style:text-underline-style="none"/>
    </style:style>
    <style:style style:name="P24" style:family="paragraph">
      <style:paragraph-properties fo:text-align="center"/>
    </style:style>
    <style:style style:name="T1" style:family="text">
      <style:text-properties officeooo:rsid="001cafdc"/>
    </style:style>
    <style:style style:name="T2" style:family="text">
      <style:text-properties officeooo:rsid="000bbef3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solid #e6e6e6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Solicitacao" form:apply-filter="true" form:command-type="query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radioReativa" form:control-implementation="ooo:com.sun.star.form.component.RadioButton" xml:id="control1" form:id="control1" form:label="Reativação de Benefício" form:tab-stop="true" form:tab-index="6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eativação de benefício cessado ou suspenso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TBM" form:control-implementation="ooo:com.sun.star.form.component.RadioButton" xml:id="control2" form:id="control2" form:label="Transferência de Benefício" form:tab-index="7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Solicita TBM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CopiaPA" form:control-implementation="ooo:com.sun.star.form.component.RadioButton" xml:id="control3" form:id="control3" form:label="Cópia de Processo Administrativo" form:tab-index="9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Solicita cópia do PA de benefício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CopiaLaudos" form:control-implementation="ooo:com.sun.star.form.component.RadioButton" xml:id="control4" form:id="control4" form:label="Cópia de Laudos Médicos" form:tab-index="10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Solicita cópia de EAM ou os laudos médicos de benefício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Isencao" form:control-implementation="ooo:com.sun.star.form.component.RadioButton" xml:id="control5" form:id="control5" form:label="Isenção do Desconto de Imposto de Renda" form:tab-index="11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Solicita isenção do desconto IR na fonte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Majoracao" form:control-implementation="ooo:com.sun.star.form.component.RadioButton" xml:id="control6" form:id="control6" form:label="Acréscimo de 25% da Renda do Benefício" form:tab-index="12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Solicita majoração de 25% de benefício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Outros" form:control-implementation="ooo:com.sun.star.form.component.RadioButton" xml:id="control7" form:id="control7" form:label="Outros:" form:tab-index="16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Outras solicitações do beneficiário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PH" form:control-implementation="ooo:com.sun.star.form.component.RadioButton" xml:id="control8" form:id="control8" form:label="Perícia Hospitalar ou Domiciliar" form:tab-index="14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Solicita perícia hospitalar ou domiciliar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xtCaixaOutros" form:control-implementation="ooo:com.sun.star.form.component.TextField" xml:id="control9" form:id="control9" form:tab-index="17" form:max-length="-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cao da Solicitação"/>
              <form:property form:property-name="ObjIDinMSO" office:value-type="float" office:value="65535"/>
            </form:properties>
          </form:text>
          <form:radio form:name="radioResiduo" form:control-implementation="ooo:com.sun.star.form.component.RadioButton" xml:id="control10" form:id="control10" form:label="Resíduo de Benefício" form:tab-stop="true" form:tab-index="8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Períodos a pagar de benefício cessado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ProrrogaSM" form:control-implementation="ooo:com.sun.star.form.component.RadioButton" xml:id="control11" form:id="control11" form:label="Prorrogação do Salário Maternidade" form:tab-index="15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Solicita prorrogação do B80 por mais 15 dias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Alta" form:control-implementation="ooo:com.sun.star.form.component.RadioButton" xml:id="control12" form:id="control12" form:label="Alta Antecipada do Benefício por Incapacidade" form:tab-index="13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Solicita perícia para antecipar DCB de B31/B32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ixaTipoProprio" form:control-implementation="ooo:com.sun.star.form.component.RadioButton" xml:id="control13" form:id="control13" form:label="Próprio(a)" form:tab-index="1" form:visual-effect="flat" formx:group-name="TIPO_SOLICIT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O solicitante é o interessado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ixaTipoProcurador" form:control-implementation="ooo:com.sun.star.form.component.RadioButton" xml:id="control14" form:id="control14" form:label="Procurador(a)" form:tab-index="2" form:visual-effect="flat" formx:group-name="TIPO_SOLICIT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epresentado com procuração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ixaTipoCurador" form:control-implementation="ooo:com.sun.star.form.component.RadioButton" xml:id="control15" form:id="control15" form:label="Curador(a)" form:tab-index="3" form:visual-effect="flat" formx:group-name="TIPO_SOLICIT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epresentado com curatela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ixaTipoTutor" form:control-implementation="ooo:com.sun.star.form.component.RadioButton" xml:id="control16" form:id="control16" form:label="Tutor(a)" form:tab-index="4" form:visual-effect="flat" formx:group-name="TIPO_SOLICIT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epresentado pelo pai, mãe ou com termo de guarda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Cancela" form:control-implementation="ooo:com.sun.star.form.component.RadioButton" xml:id="control17" form:id="control17" form:label="Cancelamento de Benefício" form:tab-index="5" form:visual-effect="flat" formx:group-name="SOLICITACA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Cancelar o beneficio na DIB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variable-decls>
        <text:variable-decl office:value-type="float" text:name="Agênc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9" draw:style-name="gr4" draw:text-style-name="P24" svg:x1="0cm" svg:y1="14.85cm" svg:x2="0.701cm" svg:y2="14.85cm">
        <text:p/>
      </draw:line>
      <text:p text:style-name="P7">SOLICITAÇÃO</text:p>
      <text:p text:style-name="P6">AO SETOR DE MANUTENÇÃO DE BENEFÍCIOS</text:p>
      <table:table table:name="TabelaDocumento" table:style-name="TabelaDocumento">
        <table:table-column table:style-name="TabelaDocumento.A"/>
        <table:table-column table:style-name="TabelaDocumento.B"/>
        <table:table-column table:style-name="TabelaDocumento.C"/>
        <table:table-column table:style-name="TabelaDocumento.D"/>
        <table:table-column table:style-name="TabelaDocumento.E"/>
        <table:table-column table:style-name="TabelaDocumento.F"/>
        <table:table-column table:style-name="TabelaDocumento.G"/>
        <table:table-column table:style-name="TabelaDocumento.H"/>
        <table:table-row table:style-name="TabelaDocumento.1">
          <table:table-cell table:style-name="TabelaDocumento.A1" table:number-columns-spanned="8" office:value-type="string">
            <text:p text:style-name="P8">SOLICITAN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Documento.1">
          <table:table-cell table:style-name="TabelaDocumento.A2" table:number-columns-spanned="8" office:value-type="string">
            <text:p text:style-name="P10">TIPO DE SOLICITANTE:<text:tab/><draw:control text:anchor-type="as-char" draw:z-index="13" draw:style-name="gr5" draw:text-style-name="P22" svg:width="2.301cm" svg:height="0.5cm" draw:control="control13"/><draw:control text:anchor-type="as-char" draw:z-index="14" draw:style-name="gr5" draw:text-style-name="P22" svg:width="2.901cm" svg:height="0.5cm" draw:control="control14"/><draw:control text:anchor-type="as-char" draw:z-index="15" draw:style-name="gr5" draw:text-style-name="P22" svg:width="2.5cm" svg:height="0.5cm" draw:control="control15"/><draw:control text:anchor-type="as-char" draw:z-index="16" draw:style-name="gr5" draw:text-style-name="P22" svg:width="2.001cm" svg:height="0.5cm" draw:control="control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Documento.1">
          <table:table-cell table:style-name="TabelaDocumento.A2" table:number-columns-spanned="8" office:value-type="string">
            <text:p text:style-name="P8">INTERESSADO(A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Documento.1">
          <table:table-cell table:style-name="TabelaDocumento.A4" table:number-columns-spanned="4" office:value-type="string">
            <text:p text:style-name="P8">DATA DE NASCIMENTO: <text:s text:c="4"/>/ <text:s text:c="5"/>/ <text:s text:c="8"/></text:p>
          </table:table-cell>
          <table:covered-table-cell/>
          <table:covered-table-cell/>
          <table:covered-table-cell/>
          <table:table-cell table:style-name="TabelaDocumento.A4" table:number-columns-spanned="2" office:value-type="string">
            <text:p text:style-name="P8">CI: </text:p>
          </table:table-cell>
          <table:covered-table-cell/>
          <table:table-cell table:style-name="TabelaDocumento.A1" table:number-columns-spanned="2" office:value-type="string">
            <text:p text:style-name="P8">CPF: </text:p>
          </table:table-cell>
          <table:covered-table-cell/>
        </table:table-row>
        <table:table-row table:style-name="TabelaDocumento.1">
          <table:table-cell table:style-name="TabelaDocumento.A4" table:number-columns-spanned="2" office:value-type="string">
            <text:p text:style-name="P8">CEP: </text:p>
          </table:table-cell>
          <table:covered-table-cell/>
          <table:table-cell table:style-name="TabelaDocumento.A1" table:number-columns-spanned="6" office:value-type="string">
            <text:p text:style-name="P8">RUA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Documento.1">
          <table:table-cell table:style-name="TabelaDocumento.A6" table:number-columns-spanned="3" office:value-type="string">
            <text:p text:style-name="P8">BAIRRO: </text:p>
          </table:table-cell>
          <table:covered-table-cell/>
          <table:covered-table-cell/>
          <table:table-cell table:style-name="TabelaDocumento.A6" table:number-columns-spanned="4" office:value-type="string">
            <text:p text:style-name="P8">CIDADE: </text:p>
          </table:table-cell>
          <table:covered-table-cell/>
          <table:covered-table-cell/>
          <table:covered-table-cell/>
          <table:table-cell table:style-name="TabelaDocumento.A2" office:value-type="string">
            <text:p text:style-name="P8">ESTADO: </text:p>
          </table:table-cell>
        </table:table-row>
        <table:table-row table:style-name="TabelaDocumento.1">
          <table:table-cell table:style-name="TabelaDocumento.A2" table:number-columns-spanned="8" office:value-type="string">
            <text:p text:style-name="P9"><text:span text:style-name="T1">Nº </text:span>TEL<text:span text:style-name="T1">EFONES</text:span>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Documento.1">
          <table:table-cell table:style-name="TabelaDocumento.A2" table:number-columns-spanned="8" office:value-type="string">
            <text:p text:style-name="P8"><text:span text:style-name="T2">E-MAIL</text:span>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Documento.1">
          <table:table-cell table:style-name="TabelaDocumento.A6" office:value-type="string">
            <text:p text:style-name="P8">ESPÉCIE: </text:p>
          </table:table-cell>
          <table:table-cell table:style-name="TabelaDocumento.A6" table:number-columns-spanned="4" office:value-type="string">
            <text:p text:style-name="P8">BENEFÍCIO: </text:p>
          </table:table-cell>
          <table:covered-table-cell/>
          <table:covered-table-cell/>
          <table:covered-table-cell/>
          <table:table-cell table:style-name="TabelaDocumento.A2" table:number-columns-spanned="3" office:value-type="string">
            <text:p text:style-name="P8">NIT: </text:p>
          </table:table-cell>
          <table:covered-table-cell/>
          <table:covered-table-cell/>
        </table:table-row>
        <table:table-row table:style-name="TabelaDocumento.10">
          <table:table-cell table:style-name="TabelaDocumento.A10" table:number-columns-spanned="8" office:value-type="string">
            <text:p text:style-name="P15">SOLICITAÇÃO DE:</text:p>
            <text:p text:style-name="P19"><draw:control text:anchor-type="char" draw:z-index="22" draw:style-name="gr1" draw:text-style-name="P22" svg:width="5.28cm" svg:height="0.6cm" svg:x="0.36cm" svg:y="0cm" draw:control="control17"/></text:p>
            <text:p text:style-name="P19"><draw:control text:anchor-type="char" draw:z-index="0" draw:style-name="gr1" draw:text-style-name="P22" svg:width="4.724cm" svg:height="0.6cm" svg:x="0.36cm" svg:y="0cm" draw:control="control1"/></text:p>
            <text:p text:style-name="P13"><draw:control text:anchor-type="paragraph" draw:z-index="1" draw:style-name="gr2" draw:text-style-name="P22" svg:width="5.201cm" svg:height="0.6cm" svg:x="0.36cm" svg:y="0cm" draw:control="control2"/></text:p>
            <text:p text:style-name="P20"><draw:control text:anchor-type="char" draw:z-index="10" draw:style-name="gr1" draw:text-style-name="P22" svg:width="4.724cm" svg:height="0.6cm" svg:x="0.36cm" svg:y="0cm" draw:control="control10"/></text:p>
            <text:p text:style-name="P14"><draw:control text:anchor-type="char" draw:z-index="2" draw:style-name="gr1" draw:text-style-name="P22" svg:width="6.471cm" svg:height="0.6cm" svg:x="0.36cm" svg:y="0cm" draw:control="control3"/></text:p>
            <text:p text:style-name="P18"><draw:control text:anchor-type="char" draw:z-index="3" draw:style-name="gr1" draw:text-style-name="P22" svg:width="6.471cm" svg:height="0.6cm" svg:x="0.36cm" svg:y="0cm" draw:control="control4"/></text:p>
            <text:p text:style-name="P18"><draw:control text:anchor-type="char" draw:z-index="4" draw:style-name="gr1" draw:text-style-name="P22" svg:width="8.402cm" svg:height="0.6cm" svg:x="0.36cm" svg:y="0cm" draw:control="control5"/></text:p>
            <text:p text:style-name="P18"><draw:control text:anchor-type="char" draw:z-index="5" draw:style-name="gr1" draw:text-style-name="P22" svg:width="7.688cm" svg:height="0.6cm" svg:x="0.36cm" svg:y="0cm" draw:control="control6"/></text:p>
            <text:p text:style-name="P18"><draw:control text:anchor-type="char" draw:z-index="12" draw:style-name="gr1" draw:text-style-name="P22" svg:width="8.64cm" svg:height="0.6cm" svg:x="0.36cm" svg:y="0cm" draw:control="control12"/></text:p>
            <text:p text:style-name="P18"><draw:control text:anchor-type="char" draw:z-index="7" draw:style-name="gr1" draw:text-style-name="P22" svg:width="6.577cm" svg:height="0.6cm" svg:x="0.36cm" svg:y="0cm" draw:control="control8"/></text:p>
            <text:p text:style-name="P18"><draw:control text:anchor-type="char" draw:z-index="11" draw:style-name="gr1" draw:text-style-name="P22" svg:width="6.762cm" svg:height="0.6cm" svg:x="0.36cm" svg:y="0cm" draw:control="control11"/></text:p>
            <text:p text:style-name="P18"><draw:control text:anchor-type="char" draw:z-index="6" draw:style-name="gr1" draw:text-style-name="P22" svg:width="1.973cm" svg:height="0.6cm" svg:x="0.36cm" svg:y="0cm" draw:control="control7"/><draw:control text:anchor-type="char" draw:z-index="8" draw:style-name="gr3" draw:text-style-name="P23" svg:width="14.251cm" svg:height="0.6cm" svg:x="2.332cm" svg:y="0cm" draw:control="control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Documento.11">
          <table:table-cell table:style-name="TabelaDocumento.A11" table:number-columns-spanned="8" office:value-type="string">
            <text:p text:style-name="P12">JUSTIFICATIVAS DA SOLICITAÇÃO:</text:p>
            <text:p text:style-name="P5"/>
            <table:table table:name="Tabela1" table:style-name="Tabela1">
              <table:table-column table:style-name="Tabela1.A"/>
              <table:table-row>
                <table:table-cell table:style-name="Tabela1.A1" office:value-type="string">
                  <text:p text:style-name="P17"/>
                </table:table-cell>
              </table:table-row>
              <table:table-row>
                <table:table-cell table:style-name="Tabela1.A2" office:value-type="string">
                  <text:p text:style-name="P17"/>
                </table:table-cell>
              </table:table-row>
              <table:table-row>
                <table:table-cell table:style-name="Tabela1.A2" office:value-type="string">
                  <text:p text:style-name="P17"/>
                </table:table-cell>
              </table:table-row>
              <table:table-row>
                <table:table-cell table:style-name="Tabela1.A2" office:value-type="string">
                  <text:p text:style-name="P17"/>
                </table:table-cell>
              </table:table-row>
              <table:table-row>
                <table:table-cell table:style-name="Tabela1.A2" office:value-type="string">
                  <text:p text:style-name="P17"/>
                </table:table-cell>
              </table:table-row>
              <table:table-row>
                <table:table-cell table:style-name="Tabela1.A2" office:value-type="string">
                  <text:p text:style-name="P17"/>
                </table:table-cell>
              </table:table-row>
              <table:table-row>
                <table:table-cell table:style-name="Tabela1.A2" office:value-type="string">
                  <text:p text:style-name="P17"/>
                </table:table-cell>
              </table:table-row>
              <table:table-row>
                <table:table-cell table:style-name="Tabela1.A2" office:value-type="string">
                  <text:p text:style-name="P17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Documento.1">
          <table:table-cell table:style-name="TabelaDocumento.A2" table:number-columns-spanned="8" office:value-type="string">
            <text:p text:style-name="P11">LOCAL E DAT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Documento.1">
          <table:table-cell table:style-name="TabelaDocumento.A13" table:number-columns-spanned="8" office:value-type="string">
            <text:p text:style-name="P11">ASSINATUR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Times New Roman3" svg:font-family="'Times New Roman'" style:font-adornments="Itálico" style:font-family-generic="roman"/>
    <style:font-face style:name="Times New Roman2" svg:font-family="'Times New Roman'" style:font-adornments="Normal" style:font-family-generic="roman"/>
    <style:font-face style:name="Times New Roman1" svg:font-family="'Times New Roman', 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Light" svg:font-family="ErieLight" style:font-family-generic="swiss" style:font-pitch="variable"/>
    <style:font-face style:name="Trebuchet MS" svg:font-family="'Trebuchet MS'" style:font-family-generic="swiss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0bbef3" style:font-size-asian="6pt" style:font-weight-asian="bold" style:font-size-complex="6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bbef3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0bbef3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bbef3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19"><draw:image xlink:href="Pictures/10000000000000F0000000F013D63E61E3BDED3E.png" xlink:type="simple" xlink:show="embed" xlink:actuate="onLoad"/></draw:frame><text:tab/></text:p>
        <text:p text:style-name="MP1"/>
        <text:p text:style-name="MP1"/>
        <text:p text:style-name="MP1"/>
        <text:p text:style-name="MP1"/>
        <text:p text:style-name="MP2"><draw:frame draw:style-name="Mfr1" draw:name="figuras2" text:anchor-type="paragraph" svg:y="0.6cm" svg:width="2.032cm" svg:height="2.032cm" draw:z-index="20"><draw:image xlink:href="Pictures/10000000000000F0000000F013D63E61E3BDED3E.png" xlink:type="simple" xlink:show="embed" xlink:actuate="onLoad"/></draw:frame></text:p>
        <text:p text:style-name="MP3"><draw:frame draw:style-name="Mfr1" draw:name="Figura4" text:anchor-type="paragraph" svg:y="0.6cm" svg:width="2.032cm" svg:height="2.032cm" draw:z-index="21"><draw:image xlink:href="Pictures/10000000000000F0000000F013D63E61E3BDED3E.png" xlink:type="simple" xlink:show="embed" xlink:actuate="onLoad"/></draw:frame></text:p>
        <text:p text:style-name="MP4"><draw:frame draw:style-name="Mfr1" draw:name="Figura3" text:anchor-type="paragraph" svg:y="0.6cm" svg:width="2.032cm" svg:height="2.032cm" draw:z-index="17"><draw:image xlink:href="Pictures/10000000000000F0000000F013D63E61E3BDED3E.png" xlink:type="simple" xlink:show="embed" xlink:actuate="onLoad"/></draw:frame><draw:frame draw:style-name="Mfr1" draw:name="Figura2" text:anchor-type="paragraph" svg:y="0.6cm" svg:width="2.032cm" svg:height="2.032cm" draw:z-index="18"><draw:image xlink:href="Pictures/10000000000000F0000000F013D63E61E3BDED3E.png" xlink:type="simple" xlink:show="embed" xlink:actuate="onLoad"/></draw:frame>INSTITUTO NACIONAL DO SEGURO SOCIAL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10-10-02T14:20:21.920000000</meta:creation-date>
    <dc:language>pt-BR</dc:language>
    <meta:editing-cycles>37</meta:editing-cycles>
    <meta:editing-duration>PT1H36M20S</meta:editing-duration>
    <meta:keyword>formulário</meta:keyword>
    <dc:subject>formulário</dc:subject>
    <dc:title>Solicitação ao Setor de Manutenção de Benefícios</dc:title>
    <meta:initial-creator>Douglas Rodrigues de Almeida</meta:initial-creator>
    <dc:date>2016-07-19T09:13:39.031000000</dc:date>
    <dc:description>Integrante do Modelo de Documentos 2016.</dc:description>
    <meta:printed-by>Douglas Rodrigues de Almeida</meta:printed-by>
    <meta:print-date>2012-01-24T10:12:08.440000000</meta:print-date>
    <dc:creator>Douglas Rodrigues de Almeida</dc:creator>
    <meta:document-statistic meta:table-count="2" meta:image-count="5" meta:object-count="0" meta:page-count="1" meta:paragraph-count="24" meta:word-count="44" meta:character-count="332" meta:non-whitespace-character-count="278"/>
    <meta:user-defined meta:name="Versão">1.7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