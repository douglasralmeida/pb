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31de65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2bfbdd" style:letter-kerning="true" style:font-size-asian="12pt"/>
    </style:style>
    <style:style style:name="P9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31de65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22b09" style:letter-kerning="true" style:font-style-asian="normal" style:font-style-complex="normal"/>
    </style:style>
    <style:style style:name="P13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2bfbdd" style:letter-kerning="true" style:font-size-asian="12pt" style:font-weight-asian="bold" style:font-weight-complex="bold"/>
    </style:style>
    <style:style style:name="P14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5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officeooo:paragraph-rsid="0031de65" style:letter-kerning="true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31de65" officeooo:paragraph-rsid="0031de65" style:letter-kerning="true" style:font-style-asian="normal" style:font-style-complex="normal"/>
    </style:style>
    <style:style style:name="P17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31de65" style:letter-kerning="true" style:font-style-asian="normal" style:font-style-complex="normal"/>
    </style:style>
    <style:style style:name="P18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bfbdd" officeooo:paragraph-rsid="0031de65" style:letter-kerning="true" style:font-style-asian="normal" style:font-style-complex="normal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fbdd" style:font-weight-asian="bold" style:font-weight-complex="bold"/>
    </style:style>
    <style:style style:name="T3" style:family="text">
      <style:text-properties fo:font-weight="bold" officeooo:rsid="003126d9" style:font-weight-asian="bold" style:font-weight-complex="bold"/>
    </style:style>
    <style:style style:name="T4" style:family="text">
      <style:text-properties fo:font-size="12pt" style:font-name-asian="Courier New" style:font-size-asian="12pt" style:font-name-complex="Courier New" style:font-size-complex="12pt"/>
    </style:style>
    <style:style style:name="T5" style:family="text">
      <style:text-properties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9" svg:x1="-0.001cm" svg:y1="14.85cm" svg:x2="0.754cm" svg:y2="14.85cm">
        <text:p/>
      </draw:line>
      <text:p text:style-name="P14"><text:span text:style-name="T1"><text:user-field-get text:name="MemoN">Ofício nº </text:user-field-get></text:span><text:span text:style-name="T3">000</text:span><text:span text:style-name="T1">/INSS/</text:span><text:span text:style-name="T1"><text:drop-down text:name=""><text:label text:value="APSBBR"/><text:label text:value="APSBFL"/><text:label text:value="APSBIBHZ"/><text:label text:value="APSBOE"/><text:label text:value="APSBPE"/><text:label text:value="APSBSE"/><text:label text:current-selected="true" text:value="APSBSU"/><text:label text:value="APSBVN"/><text:label text:value="APSDJBHZ"/><text:label text:value="APSCON"/>APSBSU</text:drop-down></text:span></text:p>
      <text:p text:style-name="P9"><text:drop-down text:name=""><text:label text:value="Belo Horizonte/MG"/><text:label text:value="Contagem/MG"/>Belo Horizonte/MG</text:drop-down>, <text:date style:data-style-name="N76" text:date-value="2017-06-12T07:34:23.732999819">12 de junho de 2017</text:date>.</text:p>
      <text:p text:style-name="P10">A(o) Senhor(a) Gerente</text:p>
      <text:p text:style-name="P10"><text:drop-down text:name=""><text:label text:value="do Banco do Brasil"/><text:label text:value="da Caixa Econômica Federal"/>do Banco do Brasil</text:drop-down></text:p>
      <text:p text:style-name="P15"><text:user-field-get text:name="Assunto">Assunto: </text:user-field-get><text:span text:style-name="T2">Saque do FGTS, PIS e PASEP</text:span></text:p>
      <text:list xml:id="list954704888" text:style-name="L1">
        <text:list-header>
          <text:p text:style-name="P16">Senhor(a) Gerente,</text:p>
        </text:list-header>
        <text:list-item>
          <text:p text:style-name="P17">Conforme previsto no <text:span text:style-name="T4">Decreto nº 6.208, de 18 de Setembro de 2007, para efetivação do cancelamento da aposentadoria, além do requerimento efetuado pelo(a) segurado(a), deverá haver </text:span><text:span text:style-name="T5">comunicação formal</text:span><text:span text:style-name="T4"> da Caixa Econômica Federal (FGTS e PIS), e/ou do Banco do Brasil (PASEP), informando se houve o saque do FGTS, PIS e PASEP.</text:span></text:p>
        </text:list-item>
        <text:list-item>
          <text:p text:style-name="P18">Diante das razões acima, encaminhamos o(a) segurado(a) <text:span text:style-name="T1"><text:text-input text:description="Nome do beneficiário">NomeSegurado</text:text-input></text:span> com o <text:span text:style-name="T1">NIT: </text:span><text:span text:style-name="T1"><text:text-input text:description="Nº de inscrição">00000000000</text:text-input></text:span> e <text:span text:style-name="T1">C.I. nº </text:span><text:span text:style-name="T1"><text:text-input text:description="Nº do documento de identidade">0000000</text:text-input></text:span>, para atendimento ao solicitado no item 1.</text:p>
        </text:list-item>
      </text:list>
      <text:p text:style-name="P12"/>
      <text:p text:style-name="P11"><text:drop-down text:name=""><text:label text:current-selected="true" text:value="Atenciosamente"/><text:label text:value="Respeitosamente"/>Atenciosamente</text:drop-down>,</text:p>
      <text:p text:style-name="P13"><draw:frame draw:style-name="fr1" draw:name="Figura1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8">Técnico do Seguro Social</text:p>
      <text:p text:style-name="P7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31de65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iguras2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3"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4">INSTITUTO NACIONAL DO SEGURO SOCIAL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current-selected="true" text:value="APS Belo Horizonte Sul - R. Guaicurus, 312, 2º andar, Centro - CEP: 30.111-060"/>APS Belo Horizonte Sul - R. Guaicurus, 312, 2º andar, Centro - CEP: 30.111-06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6-08-17T15:36:21</meta:creation-date>
    <dc:date>2017-06-12T07:34:23.433000000</dc:date>
    <meta:print-date>2016-07-20T12:15:33.684000000</meta:print-date>
    <dc:language>pt-BR</dc:language>
    <meta:editing-cycles>201</meta:editing-cycles>
    <meta:editing-duration>PT11H55M46S</meta:editing-duration>
    <dc:title>Ofício sobre Saque de PIS/PASEP/FGTS</dc:title>
    <dc:creator>Douglas Rodrigues de Almeida</dc:creator>
    <dc:description>Integrante do Modelos de Documentos 2017.</dc:description>
    <meta:printed-by>Douglas Rodrigues de Almeida</meta:printed-by>
    <meta:document-statistic meta:table-count="0" meta:image-count="3" meta:object-count="0" meta:page-count="1" meta:paragraph-count="15" meta:word-count="146" meta:character-count="879" meta:non-whitespace-character-count="757"/>
    <meta:user-defined meta:name="Versão">4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